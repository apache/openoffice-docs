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List_20_1_20_Cont." style:list-style-name="OOoBullets_20_1"/>
    <style:style style:name="P3" style:family="paragraph" style:parent-style-name="Footer">
      <style:text-properties fo:language="en" fo:country="US"/>
    </style:style>
    <style:style style:name="P4" style:family="paragraph" style:parent-style-name="OOoFooter">
      <style:text-properties fo:language="en" fo:country="US"/>
    </style:style>
    <style:style style:name="P5"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6" style:family="paragraph" style:parent-style-name="OOoFooter">
      <style:paragraph-properties fo:text-align="end" style:justify-single-word="false"/>
      <style:text-properties fo:language="en" fo:country="US"/>
    </style:style>
    <style:style style:name="P7" style:family="paragraph" style:parent-style-name="OOoFooter">
      <style:paragraph-properties fo:text-align="end" style:justify-single-word="false"/>
      <style:text-properties fo:font-size="11pt" fo:language="en" fo:country="US" style:font-size-asian="11pt" style:font-size-complex="11pt"/>
    </style:style>
    <style:style style:name="P8" style:family="paragraph" style:parent-style-name="OOoTextBody">
      <style:text-properties fo:language="en" fo:country="US"/>
    </style:style>
    <style:style style:name="P9" style:family="paragraph" style:parent-style-name="OOoTextBody">
      <style:paragraph-properties fo:text-align="start" style:justify-single-word="false"/>
      <style:text-properties fo:language="en" fo:country="US"/>
    </style:style>
    <style:style style:name="P10" style:family="paragraph" style:parent-style-name="OOoTextBody">
      <style:paragraph-properties fo:keep-together="always" fo:orphans="0" fo:widows="0"/>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fo:keep-with-next="auto"/>
      <style:text-properties fo:language="en" fo:country="US"/>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style:page-number="auto"/>
      <style:text-properties fo:language="en" fo:country="U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Figure" style:master-page-name="">
      <style:paragraph-properties style:page-number="auto"/>
      <style:text-properties fo:language="en" fo:country="US"/>
    </style:style>
    <style:style style:name="P20" style:family="paragraph" style:parent-style-name="OOoTextBody_5f_ListIntro" style:master-page-name="">
      <style:paragraph-properties style:page-number="auto"/>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center" style:justify-single-word="false"/>
      <style:text-properties fo:language="en" fo:country="US"/>
    </style:style>
    <style:style style:name="P23" style:family="paragraph" style:parent-style-name="OOoFigure" style:master-page-name="">
      <style:paragraph-properties loext:contextual-spacing="false" fo:margin-top="0.0827in" fo:margin-bottom="0.161in" style:page-number="auto"/>
      <style:text-properties fo:language="en" fo:country="US"/>
    </style:style>
    <style:style style:name="P24" style:family="paragraph" style:parent-style-name="OOoFigure">
      <style:paragraph-properties fo:margin-top="0.0827in" fo:margin-bottom="0.161in"/>
      <style:text-properties fo:language="en" fo:country="US"/>
    </style:style>
    <style:style style:name="P25" style:family="paragraph" style:parent-style-name="OOoFigure">
      <style:paragraph-properties loext:contextual-spacing="false" fo:margin-top="0.0827in" fo:margin-bottom="0.161in"/>
      <style:text-properties fo:language="en" fo:country="US"/>
    </style:style>
    <style:style style:name="P26" style:family="paragraph" style:parent-style-name="OOoFigure">
      <style:text-properties fo:language="en" fo:country="US"/>
    </style:style>
    <style:style style:name="P27" style:family="paragraph" style:parent-style-name="OOoFigure">
      <style:paragraph-properties loext:contextual-spacing="false" fo:margin-top="0.0827in" fo:margin-bottom="0.0429in"/>
      <style:text-properties fo:language="en" fo:country="US"/>
    </style:style>
    <style:style style:name="P28" style:family="paragraph" style:parent-style-name="OOoFigure">
      <style:paragraph-properties loext:contextual-spacing="false" fo:margin-top="0.0827in" fo:margin-bottom="0.122in"/>
      <style:text-properties fo:language="en" fo:country="US"/>
    </style:style>
    <style:style style:name="P29" style:family="paragraph" style:parent-style-name="OOoFigure">
      <style:paragraph-properties loext:contextual-spacing="false" fo:margin-top="0.0043in" fo:margin-bottom="0.0827in"/>
      <style:text-properties fo:language="en" fo:country="US"/>
    </style:style>
    <style:style style:name="P30" style:family="paragraph" style:parent-style-name="OOoFigure" style:master-page-name="">
      <style:paragraph-properties loext:contextual-spacing="false" fo:margin-top="0.0429in" fo:margin-bottom="0.0827in" style:page-number="auto"/>
      <style:text-properties fo:language="en" fo:country="US"/>
    </style:style>
    <style:style style:name="P31"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Tip_2f_Note_2f_Caution">
      <style:text-properties fo:language="en" fo:country="US"/>
    </style:style>
    <style:style style:name="P33"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4" style:family="paragraph" style:parent-style-name="OOoDefinitionTerm">
      <style:text-properties fo:language="en" fo:country="US"/>
    </style:style>
    <style:style style:name="P35" style:family="paragraph" style:parent-style-name="OOoTableText">
      <style:text-properties fo:language="en" fo:country="US"/>
    </style:style>
    <style:style style:name="P36" style:family="paragraph" style:parent-style-name="OOoTextBody_5f_ListIntro">
      <style:text-properties fo:language="en" fo:country="US"/>
    </style:style>
    <style:style style:name="P37" style:family="paragraph" style:parent-style-name="OOoDefinition">
      <style:text-properties fo:language="en" fo:country="US"/>
    </style:style>
    <style:style style:name="P38" style:family="paragraph" style:parent-style-name="OOoTableText">
      <style:paragraph-properties fo:margin-left="0in" fo:margin-right="0.0835in" fo:text-indent="0in" style:auto-text-indent="false"/>
      <style:text-properties fo:language="en" fo:country="US"/>
    </style:style>
    <style:style style:name="P39" style:family="paragraph" style:parent-style-name="OOoHeading_20_2">
      <style:text-properties fo:language="en" fo:country="US"/>
    </style:style>
    <style:style style:name="P40" style:family="paragraph" style:parent-style-name="OOoHeading_20_2" style:master-page-name="">
      <style:paragraph-properties loext:contextual-spacing="false" fo:margin-top="0.1138in" fo:margin-bottom="0.0429in" style:page-number="auto"/>
      <style:text-properties fo:language="en" fo:country="US"/>
    </style:style>
    <style:style style:name="P41" style:family="paragraph" style:parent-style-name="OOoHeading_20_2">
      <style:paragraph-properties loext:contextual-spacing="false" fo:margin-top="0.1138in" fo:margin-bottom="0.0429in"/>
      <style:text-properties fo:language="en" fo:country="US"/>
    </style:style>
    <style:style style:name="P42" style:family="paragraph" style:parent-style-name="OOoHeading_20_2" style:master-page-name="">
      <style:paragraph-properties style:page-number="auto" fo:keep-with-next="always"/>
      <style:text-properties fo:language="en" fo:country="US"/>
    </style:style>
    <style:style style:name="P43" style:family="paragraph" style:parent-style-name="OOoHeading_20_3">
      <style:text-properties fo:language="en" fo:country="US"/>
    </style:style>
    <style:style style:name="P44" style:family="paragraph" style:parent-style-name="OOoHeading_20_3">
      <style:paragraph-properties loext:contextual-spacing="false" fo:margin-top="0.0866in" fo:margin-bottom="0.0429in"/>
      <style:text-properties fo:language="en" fo:country="US"/>
    </style:style>
    <style:style style:name="P45" style:family="paragraph" style:parent-style-name="OOoNum_20_123_20_End" style:list-style-name="OOoNum_20_123"/>
    <style:style style:name="P46" style:family="paragraph" style:parent-style-name="OOoList_20_2_20_Start">
      <style:text-properties fo:language="en" fo:country="US"/>
    </style:style>
    <style:style style:name="P47" style:family="paragraph" style:parent-style-name="OOoNum_20_123_20_Start" style:master-page-name="">
      <style:paragraph-properties style:page-number="auto" style:shadow="none" fo:keep-with-next="always"/>
    </style:style>
    <style:style style:name="P48" style:family="paragraph" style:parent-style-name="OOoNum_20_123_20_Start" style:list-style-name="OOoNum_20_123" style:master-page-name="">
      <style:paragraph-properties style:page-number="auto" style:shadow="none" fo:keep-with-next="always"/>
    </style:style>
    <style:style style:name="P49" style:family="paragraph" style:parent-style-name="OOoList_20_2_20_End">
      <style:text-properties fo:language="en" fo:country="US"/>
    </style:style>
    <style:style style:name="P50" style:family="paragraph" style:parent-style-name="OOoList_20_1_20_End">
      <style:text-properties fo:language="en" fo:country="US"/>
    </style:style>
    <style:style style:name="P51" style:family="paragraph" style:parent-style-name="OOoList_20_1_20_End" style:list-style-name="OOoBullets_20_1">
      <style:text-properties fo:language="en" fo:country="U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text-properties fo:language="en" fo:country="US"/>
    </style:style>
    <style:style style:name="P55"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6" style:family="paragraph" style:parent-style-name="OOoList_20_1_20_Cont." style:list-style-name="OOoBullets_20_1">
      <style:paragraph-properties fo:margin-top="0in" fo:margin-bottom="0.0417in" fo:orphans="0" fo:widows="0">
        <style:tab-stops/>
      </style:paragraph-propertie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OOoHeading_20_1">
      <style:text-properties fo:language="en" fo:country="US"/>
    </style:style>
    <style:style style:name="P62" style:family="paragraph" style:parent-style-name="OOoHeading_20_1" style:master-page-name="">
      <style:paragraph-properties style:page-number="auto" fo:keep-with-next="always"/>
      <style:text-properties fo:language="en" fo:country="US"/>
    </style:style>
    <style:style style:name="P63" style:family="paragraph" style:parent-style-name="OOoHeading_20_1" style:master-page-name="">
      <style:paragraph-properties style:page-number="auto"/>
      <style:text-properties fo:language="en" fo:country="US"/>
    </style:style>
    <style:style style:name="P64" style:family="paragraph" style:parent-style-name="OOoHeading_20_1">
      <style:paragraph-properties loext:contextual-spacing="false" fo:margin-top="0.1728in" fo:margin-bottom="0.0866in"/>
      <style:text-properties fo:language="en" fo:country="US"/>
    </style:style>
    <style:style style:name="P65" style:family="paragraph" style:parent-style-name="OOoTextBody">
      <style:text-properties fo:language="en" fo:country="US"/>
    </style:style>
    <style:style style:name="P6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color="#0084d1" style:font-name="Liberation Sans" fo:font-size="16pt" fo:font-weight="bold" style:font-weight-asian="normal" loext:opacity="100%"/>
    </style:style>
    <style:style style:name="T12" style:family="text">
      <style:text-properties style:font-name="Times New Roman1" fo:font-size="12pt" fo:language="en" fo:country="US" style:letter-kerning="true"/>
    </style:style>
    <style:style style:name="T13" style:family="text">
      <style:text-properties style:font-name="Liberation Sans1" fo:font-size="11pt"/>
    </style:style>
    <style:style style:name="T14" style:family="text">
      <style:text-properties style:font-name="Liberation Sans1" fo:font-size="11pt" fo:language="en" fo:country="US"/>
    </style:style>
    <style:style style:name="T15" style:family="text">
      <style:text-properties style:use-window-font-color="true" style:font-name="Times New Roman1" fo:font-size="12pt" fo:language="en" fo:country="US" style:letter-kerning="true" style:font-weight-complex="bold" loext:opacity="0%"/>
    </style:style>
    <style:style style:name="T16" style:family="text">
      <style:text-properties style:use-window-font-color="true" style:font-name="Times New Roman1" fo:font-size="12pt" fo:language="en" fo:country="US" style:letter-kerning="true" loext:opacity="0%"/>
    </style:style>
    <style:style style:name="T17" style:family="text">
      <style:text-properties style:use-window-font-color="true" style:font-name="Times New Roman2" fo:font-size="12pt" fo:language="en" fo:country="US" fo:font-weight="bold" style:letter-kerning="true" style:font-weight-asian="bold" style:font-weight-complex="bold" loext:opacity="0%"/>
    </style:style>
    <style:style style:name="T18" style:family="text">
      <style:text-properties style:use-window-font-color="true" fo:language="en" fo:country="US" fo:font-weight="normal" style:font-weight-asian="normal" style:font-weight-complex="normal" loext:opacity="0%"/>
    </style:style>
    <style:style style:name="T19" style:family="text">
      <style:text-properties style:use-window-font-color="true" fo:language="en" fo:country="US" fo:font-weight="bold" style:font-weight-asian="bold" style:font-weight-complex="bold" loext:opacity="0%"/>
    </style:style>
    <style:style style:name="T20" style:family="text">
      <style:text-properties style:use-window-font-color="true" fo:language="en" fo:country="US" loext:opacity="0%"/>
    </style:style>
    <style:style style:name="T21" style:family="text">
      <style:text-properties style:use-window-font-color="true" fo:language="en" fo:country="US" style:font-weight-asian="bold" style:font-weight-complex="bold" loext:opacity="0%"/>
    </style:style>
    <style:style style:name="T22" style:family="text">
      <style:text-properties style:use-window-font-color="true" fo:language="en" fo:country="US" fo:font-style="normal" style:font-style-asian="normal" style:font-style-complex="normal" loext:opacity="0%"/>
    </style:style>
    <style:style style:name="T23" style:family="text">
      <style:text-properties style:font-name="Times New Roman2" fo:font-size="12pt" fo:language="en" fo:country="US" fo:font-weight="bold" style:letter-kerning="true" style:font-weight-asian="bold" style:font-weight-complex="bold"/>
    </style:style>
    <style:style style:name="T24" style:family="text">
      <style:text-properties fo:color="#000000" fo:language="en" fo:country="US" fo:font-weight="normal" style:font-weight-asian="normal" style:font-weight-complex="normal" loext:opacity="100%"/>
    </style:style>
    <style:style style:name="T25"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170304336" text:id="ct170304336">
          <text:insertion>
            <office:change-info>
              <dc:creator>Keith McKenna</dc:creator>
              <dc:date>2022-07-09T13:29:00</dc:date>
            </office:change-info>
          </text:insertion>
        </text:changed-region>
        <text:changed-region xml:id="ct170303608" text:id="ct170303608">
          <text:deletion>
            <office:change-info>
              <dc:creator>Keith McKenna</dc:creator>
              <dc:date>2022-07-09T13:29:00</dc:date>
            </office:change-info>
            <text:p text:style-name="P1">. </text:p>
          </text:deletion>
        </text:changed-region>
        <text:changed-region xml:id="ct170305896" text:id="ct170305896">
          <text:format-change>
            <office:change-info>
              <dc:creator>Keith McKenna</dc:creator>
              <dc:date>2022-07-09T13:47:00</dc:date>
            </office:change-info>
          </text:format-change>
        </text:changed-region>
        <text:changed-region xml:id="ct170304960" text:id="ct170304960">
          <text:insertion>
            <office:change-info>
              <dc:creator>Keith McKenna</dc:creator>
              <dc:date>2022-07-09T14:25:00</dc:date>
            </office:change-info>
          </text:insertion>
        </text:changed-region>
        <text:changed-region xml:id="ct170306000" text:id="ct170306000">
          <text:deletion>
            <office:change-info>
              <dc:creator>Keith McKenna</dc:creator>
              <dc:date>2022-07-09T14:25:00</dc:date>
            </office:change-info>
            <text:list xml:id="list7818123688086965343" text:style-name="OOoBullets_20_1">
              <text:list-item>
                <text:p text:style-name="P2"><text:span text:style-name="OOoStrongEmphasis"><text:span text:style-name="T1">Tools contains</text:span></text:span></text:p>
              </text:list-item>
            </text:list>
          </text:deletion>
        </text:changed-region>
        <text:changed-region xml:id="ct168816928" text:id="ct168816928">
          <text:format-change>
            <office:change-info>
              <dc:creator>Keith McKenna</dc:creator>
              <dc:date>2022-07-09T14:35:00</dc:date>
            </office:change-info>
          </text:format-change>
        </text:changed-region>
        <text:changed-region xml:id="ct168817448" text:id="ct168817448">
          <text:format-change>
            <office:change-info>
              <dc:creator>Keith McKenna</dc:creator>
              <dc:date>2022-07-09T14:39:00</dc:date>
            </office:change-info>
          </text:format-change>
        </text:changed-region>
        <text:changed-region xml:id="ct59673040" text:id="ct59673040">
          <text:insertion>
            <office:change-info>
              <dc:creator>Keith McKenna</dc:creator>
              <dc:date>2022-07-09T19:34:00</dc:date>
            </office:change-info>
          </text:insertion>
        </text:changed-region>
        <text:changed-region xml:id="ct59671168" text:id="ct59671168">
          <text:deletion>
            <office:change-info>
              <dc:creator>Keith McKenna</dc:creator>
              <dc:date>2022-07-09T19:34:00</dc:date>
            </office:change-info>
            <text:p text:style-name="P1">. </text:p>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span text:style-name="T1">Chapter </text:span><text:span text:style-name="OOoChapterNumber"><text:span text:style-name="T1">1</text:span></text:span><text:span text:style-name="T1"> <text:line-break/>Introducing Apache OpenOffice</text:span></text:h>
      <text:h text:style-name="P61"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40"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1"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1"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1" text:outline-level="3">Draw (vector graphics)</text:h>
      <text:p text:style-name="P18">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1"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text:change-start text:change-id="ct170304336"/>.<text:change-end text:change-id="ct170304336"/><text:change text:change-id="ct170303608"/></text:p>
      <text:h text:style-name="P39"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1" text:outline-level="2"><text:span text:style-name="T11">A</text:span>dvantages of Apache OpenOffice</text:h>
      <text:p text:style-name="OOoTextBody_5f_ListIntro">Here are some of the <text:alphabetical-index-mark-start text:id="IMark1146234600"/>advantages of Apache OpenOffice<text:alphabetical-index-mark-end text:id="IMark1146234600"/> over proprietary office suites:</text:p>
      <text:list xml:id="list39724837" text:continue-list="list7818123688086965343" text:style-name="OOoBullets_20_1">
        <text:list-item text:start-value="1">
          <text:p text:style-name="OOoList_20_1_20_Start"><text:span text:style-name="OOoStrongEmphasis"><text:span text:style-name="T1">No licensing fees</text:span></text:span><text:span text:style-name="T12">. </text:span><text:span text:style-name="T1">Apache OpenOffice is free for anyone to use and distribute at no cost</text:span><text:span text:style-name="T12">.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146235128"/><text:span text:style-name="OOoStrongEmphasis"><text:span text:style-name="T1">language support</text:span></text:span><text:alphabetical-index-mark-end text:id="IMark1146235128"/><text:span text:style-name="T1">. The user interface for Apache OpenOffice is available in several languages, along with spelling, hyphenation, and thesaurus dictionaries. </text:span><text:span text:style-name="T14">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5"> </text:span><text:span text:style-name="T18">All</text:span><text:span text:style-name="T19"> </text:span><text:span text:style-name="T20">the components have a similar “look and feel,” making them easy to use and master.</text:span></text:p>
        </text:list-item>
        <text:list-item>
          <text:p text:style-name="OOoList_20_1_20_Cont."><text:span text:style-name="OOoStrongEmphasis"><text:span text:style-name="T1">Integration.</text:span></text:span><text:span text:style-name="T20"> The components of Apache OpenOffice are well integrated with one another.</text:span></text:p>
        </text:list-item>
      </text:list>
      <text:list xml:id="list2520355717077950284" text:style-name="OOoBullets_20_2">
        <text:list-item>
          <text:list>
            <text:list-item>
              <text:p text:style-name="P4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9">You do not need to know which application was used to create a particular file. For example, you can open a Draw file from Writer; it will open automatically in Draw.</text:p>
            </text:list-item>
          </text:list>
        </text:list-item>
      </text:list>
      <text:list xml:id="list39705284" text:continue-list="list39724837" text:style-name="OOoBullets_20_1">
        <text:list-item>
          <text:p text:style-name="OOoList_20_1_20_Cont."><text:span text:style-name="OOoStrongEmphasis"><text:span text:style-name="T21">Granularity</text:span></text:span><text:span text:style-name="OOoStrongEmphasis"><text:span text:style-name="T17">. </text:span></text:span><text:span text:style-name="T1">Usually,</text:span><text:span text:style-name="T20"> if you change an option, it affects all components</text:span><text:span text:style-name="T16">. </text:span><text:span text:style-name="T20">However, Apache OpenOffice o</text:span><text:span text:style-name="T22">ptions</text:span><text:span text:style-name="T20"> can be set at a </text:span><text:span text:style-name="T18">component level or even document level.</text:span></text:p>
        </text:list-item>
        <text:list-item>
          <text:p text:style-name="P2"><text:span text:style-name="OOoStrongEmphasis"><text:span text:style-name="T21">File compatibili</text:span></text:span><text:span text:style-name="OOoStrongEmphasis"><text:span text:style-name="T4">ty.</text:span></text:span><text:span text:style-name="T3">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3">. </text:span></text:span><text:span text:style-name="T1">Apache OpenOffice uses </text:span><text:alphabetical-index-mark text:string-value="OpenDocument format"/><text:span text:style-name="T1">OpenDocument, an XML (</text:span><text:span text:style-name="T6">eXtensible Markup Language</text:span><text:span text:style-name="T1">) file format developed as an industry standard by </text:span><text:alphabetical-index-mark-start text:id="IMark1146235128"/><text:span text:style-name="T1">OASIS</text:span><text:alphabetical-index-mark-end text:id="IMark114623512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4"> Enhancements, software fixes, and release dates are community-driven</text:span></text:span><text:span text:style-name="Definition"><text:span text:style-name="T24">. You can join the community and affect the course of the product you use.</text:span></text:span></text:p>
        </text:list-item>
      </text:list>
      <text:h text:style-name="P61" text:outline-level="2">Minimum Requirements</text:h>
      <text:p text:style-name="P36">Apache OpenOffice 4.1 requires one of the following operating systems:</text:p>
      <text:list xml:id="list39704542" text:continue-list="list39705284" text:style-name="OOoBullets_20_1">
        <text:list-item text:start-value="1">
          <text:p text:style-name="P5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8">For Microsoft Windows 32-bit JRE MUST be installed, even on a 64-bit machine</text:p>
          </table:table-cell>
        </table:table-row>
      </table:table>
      <text:p text:style-name="OOoTextBody"/>
      <text:h text:style-name="P62" text:outline-level="2"><text:soft-page-break/>How to Get and Install the Software</text:h>
      <text:p text:style-name="P15"><text:span text:style-name="T1">You can </text:span><text:alphabetical-index-mark text:string-value="downloading OpenOffice.org"/><text:span text:style-name="T1">download the installation package (approximately 150 MB) from the project’s website, </text:span><text:change-start text:change-id="ct170305896"/><text:a xlink:type="simple" xlink:href="https://www.openoffice.org/download/index.html" text:style-name="Internet_20_link" text:visited-style-name="Visited_20_Internet_20_Link"><text:span text:style-name="T1">https://www.openoffice.org/download/index.html</text:span></text:a><text:change-end text:change-id="ct170305896"/><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63"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https://extensions.openoffice.org/</text:a><text:span text:style-name="T1">. Most are free, but some are not. See Chapter 11 (Setting up and Customizing Apache OpenOffice) for more information.</text:span></text:p>
      <text:h text:style-name="P61" text:outline-level="2"><text:alphabetical-index-mark text:string-value="starting OpenOffice.org"/>Starting Apache OpenOffice</text:h>
      <text:p text:style-name="P1">In general, you start Apache OpenOffice the same way you start any other program on your computer.</text:p>
      <text:p text:style-name="P1">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710239" text:continue-numbering="true" text:style-name="OOoBullets_20_1">
        <text:list-item>
          <text:p text:style-name="P58">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53">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9"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3" text:outline-level="4">Using the Quick-Starter Icon</text:h>
      <text:p text:style-name="P13"><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3"><draw:frame draw:style-name="fr1" draw:name="Figure_AOO41GS02_1" text:anchor-type="as-char" svg:width="2.8547in" draw:z-index="15"><draw:text-box fo:min-height="2.8681in"><text:p text:style-name="P21"><draw:frame draw:style-name="fr13" draw:name="AOO41GS02_001" text:anchor-type="paragraph" svg:width="2.7902in" svg:height="2.8283in" draw:z-index="19"><draw:image xlink:href="Pictures/1000020100000125000001297252A390.png" xlink:type="simple" xlink:show="embed" xlink:actuate="onLoad"/></draw:frame>Figure <text:sequence text:ref-name="refFigure0" text:name="Figure" text:formula="ooow:Figure+1" style:num-format="1">1</text:sequence>: Quickstarter pop-up menu</text:p></draw:text-box></draw:frame></text:p>
      <text:h text:style-name="P4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4"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9" text:outline-level="3">Using the Quick-Starter in Linux and macOS</text:h>
      <text:p text:style-name="P16"><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9">macOS provides similar functionality through a pop-up menu from the dock.</text:p>
      <text:h text:style-name="P61" text:outline-level="2"><text:soft-page-break/><text:alphabetical-index-mark text:string-value="parts of the main window"/>Parts of the Main window</text:h>
      <text:p text:style-name="P12">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OOoTextBody"><draw:frame draw:style-name="fr2" draw:name="Figure_AOO41GS02_2" text:anchor-type="paragraph" svg:x="0.0043in" svg:y="-0.0063in" svg:width="6.5992in" draw:z-index="1"><draw:text-box fo:min-height="4.2661in"><text:p text:style-name="OOoFigureCaption"><draw:frame draw:style-name="fr14" draw:name="AOO41GS02_002" text:anchor-type="paragraph" svg:x="0in" svg:y="0.0161in" svg:width="6.5992in" svg:height="4.7098in" draw:z-index="2"><draw:image xlink:href="Pictures/10000201000002B5000001C0AE19C49F.png" xlink:type="simple" xlink:show="embed" xlink:actuate="onLoad"/></draw:frame>Figure <text:sequence text:ref-name="refFigure1" text:name="Figure" text:formula="ooow:Figure+1" style:num-format="1">2</text:sequence> <text:span text:style-name="T1">Elements of the main Writer window</text:span></text:p></draw:text-box></draw:frame></text:p>
      <text:h text:style-name="P39" text:outline-level="3">Menu Bar</text:h>
      <text:p text:style-name="P36">The <text:alphabetical-index-mark text:string-value="menu bar"/><text:span text:style-name="T10">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9731837" text:continue-list="list39710239"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change-start text:change-id="ct170304960"/><text:span text:style-name="OOoStrongEmphasis"><text:span text:style-name="T1">Tools contain</text:span></text:span><text:change-end text:change-id="ct170304960"/><text:change text:change-id="ct170306000"/><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2" text:outline-level="3"><text:alphabetical-index-mark text:string-value="overview" text:key1="toolbars"/>Toolbars</text:h>
      <text:p text:style-name="P14">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4"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3">, then click on the name of a toolbar in the list.</text:span><text:span text:style-name="T1"> An active toolbar shows a check mark beside its name. Tear-off toolbars are not listed in the View menu.</text:span></text:p>
      <text:h text:style-name="P44" text:outline-level="4">Submenus and T<text:alphabetical-index-mark-start text:id="IMark84965988"/>ear-Off Toolbars<text:alphabetical-index-mark-end text:id="IMark8496598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6"><draw:frame draw:style-name="fr3" draw:name="Figure_AOO41GS02_3" text:anchor-type="as-char" svg:y="-0.8811in" svg:width="4.5091in" draw:z-index="28"><draw:text-box fo:min-height="2.5626in"><text:p text:style-name="P21"><draw:frame draw:style-name="fr15" draw:name="AOO41GS02_003" text:anchor-type="as-char" svg:width="4.5193in" svg:height="2.3264in" draw:z-index="34"><draw:image xlink:href="Pictures/10000201000002420000011BBE8C4F0C.png" xlink:type="simple" xlink:show="embed" xlink:actuate="onLoad"/></draw:frame></text:p><text:p text:style-name="P21">Figure <text:sequence text:ref-name="refFigure2" text:name="Figure" text:formula="ooow:Figure+1" style:num-format="1">3</text:sequence>: Example of a tear-off toolbar</text:p></draw:text-box></draw:frame> </text:p>
      <text:h text:style-name="P44" text:outline-level="4"><text:soft-page-break/>Floating Toolbars</text:h>
      <text:p text:style-name="OOoTextBody"><text:span text:style-name="T1">Apache OpenOffice includes several additional context-sensitive toolbars, whose defaults appear as </text:span><text:alphabetical-index-mark-start text:id="IMark26970764"/><text:span text:style-name="T1">floating toolbars</text:span><text:alphabetical-index-mark-end text:id="IMark26970764"/><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7">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7">mouse button (</text:span></text:span><text:span text:style-name="OOoEmphasis"><text:span text:style-name="T7"><text:sequence-ref text:reference-format="category-and-value" text:ref-name="refFigure3">Figure 4</text:sequence-ref></text:span></text:span><text:span text:style-name="OOoEmphasis"><text:span text:style-name="T7">)</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7"><draw:frame draw:style-name="fr4" draw:name="Figure_AOO41GS02_4" text:anchor-type="as-char" svg:width="4.8465in" draw:z-index="7"><draw:text-box fo:min-height="1.3673in"><text:p text:style-name="P21"><draw:frame draw:style-name="fr13" draw:name="AOO41GS02_004" text:anchor-type="paragraph" svg:width="4.8181in" svg:height="1.1866in" draw:z-index="12"><draw:image xlink:href="Pictures/10000201000001FB0000007DF5733DD9.png" xlink:type="simple" xlink:show="embed" xlink:actuate="onLoad"/></draw:frame>Figure <text:sequence text:ref-name="refFigure3" text:name="Figure" text:formula="ooow:Figure+1" style:num-format="1">4</text:sequence>: Moving a docked toolbar</text:p></draw:text-box></draw:frame> </text:p>
      <text:p text:style-name="P28"><draw:frame draw:style-name="fr4" draw:name="Figure_AOO41GS02_5" text:anchor-type="as-char" svg:width="4.398in" draw:z-index="13"><draw:text-box fo:min-height="1.1744in"><text:p text:style-name="P21"><draw:frame draw:style-name="fr16" draw:name="AOO41GS02_005" text:anchor-type="as-char" svg:width="4.398in" svg:height="0.9839in" draw:z-index="14"><draw:image xlink:href="Pictures/10000201000001990000005F4023753F.png" xlink:type="simple" xlink:show="embed" xlink:actuate="onLoad"/></draw:frame></text:p><text:p text:style-name="P21">Figure <text:sequence text:ref-name="refFigure4" text:name="Figure" text:formula="ooow:Figure+1" style:num-format="1">5</text:sequence>: Moving a floating toolbar</text:p></draw:text-box></draw:frame> </text:p>
      <text:h text:style-name="P44"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11"><text:span text:style-name="T1">To dock a window or toolbar, hold down the </text:span><text:change-start text:change-id="ct168816928"/><text:span text:style-name="OOoKeystroke">Ctrl</text:span><text:change-end text:change-id="ct168816928"/><text:span text:style-name="T1"> key and double-click on the frame of the floating window (or in a vacant area near the icons at the top of the floating window) to dock it in its last position.</text:span></text:p>
      <text:p text:style-name="P26"><draw:frame draw:style-name="fr5" draw:name="Figure_AOO41GS02_6" text:anchor-type="as-char" svg:width="2.9374in" draw:z-index="16"><draw:text-box fo:min-height="1.3154in"><text:p text:style-name="P21"><draw:frame draw:style-name="fr17" draw:name="AOO41GS02_006" text:anchor-type="paragraph" svg:x="0.0016in" svg:y="0.0008in" svg:width="2.6882in" svg:height="1.102in" draw:z-index="17"><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change-start text:change-id="ct168817448"/><text:span text:style-name="OOoKeystroke">Ctrl</text:span><text:change-end text:change-id="ct168817448"/> key and double-click on the frame (or a vacant area near the icons at the top) of the docked window.</text:p>
      <text:h text:style-name="P44"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26"><draw:frame draw:style-name="fr6" draw:name="Figure_AOO41GS02_7" text:anchor-type="as-char" svg:width="2.9071in" draw:z-index="20"><draw:text-box fo:min-height="1.4075in"><text:p text:style-name="P21"><draw:frame draw:style-name="fr18" draw:name="AOO41GS02_007" text:anchor-type="as-char" svg:width="2.9071in" svg:height="1.1016in" draw:z-index="21"><draw:image xlink:href="Pictures/100002010000012D00000072DC59604F.png" xlink:type="simple" xlink:show="embed" xlink:actuate="onLoad"/></draw:frame></text:p><text:p text:style-name="P21">Figure <text:sequence text:ref-name="refFigure6" text:name="Figure" text:formula="ooow:Figure+1" style:num-format="1">7</text:sequence>: Customizing toolbars</text:p></draw:text-box></draw:frame> </text:p>
      <text:p text:style-name="OOoTextBody"><text:span text:style-name="T1">To </text:span><text:alphabetical-index-mark-start text:id="IMark26970764" text:key1="toolbars"/><text:span text:style-name="T1">show or hide icons</text:span><text:alphabetical-index-mark-end text:id="IMark2697076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9"><draw:frame draw:style-name="fr5" draw:name="Figure_AOO41GS02_8" text:anchor-type="as-char" svg:width="4.5083in" draw:z-index="22"><draw:text-box fo:min-height="2.2689in"><text:p text:style-name="P21"><draw:frame draw:style-name="fr19" draw:name="AOO41GS02_008" text:anchor-type="paragraph" svg:x="0.0016in" svg:y="0.0008in" svg:width="5.5583in" style:rel-width="100%" svg:height="2.6189in" style:rel-height="scale" draw:z-index="23"><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9" text:outline-level="3"><text:alphabetical-index-mark text:string-value="right-click (context) menus"/><text:alphabetical-index-mark text:string-value="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9" text:outline-level="3">Status Bar</text:h>
      <text:p text:style-name="P1">The <text:alphabetical-index-mark-start text:id="IMark181943296"/>status bar<text:alphabetical-index-mark-end text:id="IMark181943296"/> is located at the bottom of the workspace. It provides information about the document and convenient ways to quickly change some features. It is similar in Writer, Calc, Impress, and Draw, although each component includes some component-specific items.</text:p>
      <text:p text:style-name="P27"><draw:frame draw:style-name="fr5" draw:name="Figure_AOO41GS02_9" text:anchor-type="as-char" svg:width="5.5689in" draw:z-index="24"><draw:text-box fo:min-height="1.2602in"><text:p text:style-name="P21"><draw:frame draw:style-name="fr20" draw:name="AOO41GS02_009" text:anchor-type="as-char" svg:width="5.5709in" svg:height="1.0043in" draw:z-index="25"><draw:image xlink:href="Pictures/10000201000001D100000054FF95BD04.png" xlink:type="simple" xlink:show="embed" xlink:actuate="onLoad"/></draw:frame></text:p><text:p text:style-name="P21">Figure <text:sequence text:ref-name="refFigure8" text:name="Figure" text:formula="ooow:Figure+1" style:num-format="1">9</text:sequence>: Left end of status bar in Writer</text:p></draw:text-box></draw:frame> </text:p>
      <text:p text:style-name="P25"><text:soft-page-break/><draw:frame draw:style-name="fr5" draw:name="Figure_AOO41GS02_10" text:anchor-type="as-char" svg:width="5.602in" draw:z-index="26"><draw:text-box fo:min-height="1.2563in"><text:p text:style-name="P21"><draw:frame draw:style-name="fr21" draw:name="AOO41GS02_010" text:anchor-type="paragraph" svg:x="0in" svg:y="0in" svg:width="5.602in" svg:height="1.0665in" draw:z-index="33"><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20">Common status bar items are described below.</text:p>
      <text:p text:style-name="P34">Page, sheet, or slide number</text:p>
      <text:p text:style-name="P37">Shows the current page, sheet, or slide number and the total number of pages, sheets, or slides in the document. Double-click on this field to open the Navigator. Other uses of this field depend on the component.</text:p>
      <text:p text:style-name="P34">Page style or slide design</text:p>
      <text:p text:style-name="P37">Shows the current page style or slide design. To edit the current page style or slide design, double-click on this field.</text:p>
      <text:p text:style-name="P34">Unsaved changes</text:p>
      <text:p text:style-name="P37">An asterisk (*) appears here if changes to the document have not been saved.</text:p>
      <text:p text:style-name="P34">Digital signature</text:p>
      <text:p text:style-name="P37">If the document has been digitally signed, an icon shows here. You can double-click the icon to view the certificate.</text:p>
      <text:p text:style-name="P34">Object information</text:p>
      <text:p text:style-name="P37">Displays information relevant to the cursor’s position or the selected element of the document. Double-clicking in this area usually opens a relevant dialog.</text:p>
      <text:p text:style-name="P34">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9" text:outline-level="3"><text:alphabetical-index-mark-start text:id="IMark181943296"/>Sidebar<text:alphabetical-index-mark-end text:id="IMark181943296"/></text:h>
      <text:p text:style-name="P1">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26"><draw:frame draw:style-name="fr7" draw:name="Figure_AOO41GS02_11" text:anchor-type="as-char" svg:width="5.0193in" draw:z-index="27"><draw:text-box fo:min-height="4.5866in"><text:p text:style-name="P21"><draw:frame draw:style-name="fr13" draw:name="AOO41GS02_011" text:anchor-type="paragraph" svg:width="4.9709in" svg:height="4.361in" draw:z-index="31"><draw:image xlink:href="Pictures/100002010000020A000001CA87D639CE.png" xlink:type="simple" xlink:show="embed" xlink:actuate="onLoad"/></draw:frame>Figure <text:sequence text:ref-name="refFigure10" text:name="Figure" text:formula="ooow:Figure+1" style:num-format="1">11</text:sequence>: Properties panel of Sidebar in Writer</text:p></draw:text-box></draw:frame></text:p>
      <text:p text:style-name="P26"><draw:frame draw:style-name="fr8" draw:name="Figure_AOO41GS02_12" text:anchor-type="as-char" svg:y="-2.1181in" svg:width="4.4807in" draw:z-index="0"><draw:text-box fo:min-height="1.7917in"><text:p text:style-name="P21"><draw:frame draw:style-name="fr13" draw:name="AOO41GS02_012" text:anchor-type="paragraph" svg:width="1.9898in" svg:height="1.5425in" draw:z-index="29"><draw:image xlink:href="Pictures/10000000000000D1000000A2A50BBDF7.png" xlink:type="simple" xlink:show="embed" xlink:actuate="onLoad"/></draw:frame>Figure <text:sequence text:ref-name="refFigure11" text:name="Figure" text:formula="ooow:Figure+1" style:num-format="1">12</text:sequence>: Floating (undocking) or docking the Sidebar</text:p></draw:text-box></draw:frame></text:p>
      <text:h text:style-name="P61" text:outline-level="2"><text:alphabetical-index-mark text:string-value="starting a new document"/>Starting a New Document</text:h>
      <text:p text:style-name="P12">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8">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30"><text:soft-page-break/><draw:frame draw:style-name="fr5" draw:name="Figure_AOO41GS02_13" text:anchor-type="as-char" svg:width="5.961in" draw:z-index="30"><draw:text-box fo:min-height="4.1854in"><text:p text:style-name="P21"><draw:frame draw:style-name="fr22" draw:name="AOO41GS02_013" text:anchor-type="as-char" svg:width="5.961in" svg:height="4.0626in" draw:z-index="32"><draw:image xlink:href="Pictures/10000201000003F0000002AF5F93A91F.png" xlink:type="simple" xlink:show="embed" xlink:actuate="onLoad"/></draw:frame>Figure <text:sequence text:ref-name="refFigure12" text:name="Figure" text:formula="ooow:Figure+1" style:num-format="1">13</text:sequence>: Apache OpenOffice <text:alphabetical-index-mark-start text:id="IMark898124444"/>Start Center<text:alphabetical-index-mark-end text:id="IMark898124444"/></text:p></draw:text-box></draw:frame> </text:p>
      <text:p text:style-name="P20">You can also start a new document in one of the following ways.</text:p>
      <text:list xml:id="list8167437571562451636" text:style-name="OOoBullets_20_1">
        <text:list-item>
          <text:p text:style-name="P59"><text:span text:style-name="T1">Use </text:span><text:span text:style-name="OOoMenuPath"><text:span text:style-name="T1">File &gt; New</text:span></text:span><text:span text:style-name="T1"> and choose the type of document.</text:span></text:p>
        </text:list-item>
      </text:list>
      <text:list xml:id="list39715199" text:continue-list="list39731837"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64"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draw:frame draw:style-name="fr18" draw:name="AOO41GS02_014" text:anchor-type="as-char" svg:width="3.3583in" svg:height="1.2319in" draw:z-index="35"><draw:image xlink:href="Pictures/100000000000017B0000008BB105B3F7.png" xlink:type="simple" xlink:show="embed" xlink:actuate="onLoad"/></draw:frame></text:p>
      <text:p text:style-name="P36">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9734946" text:continue-list="list39715199"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61" text:outline-level="2"><text:alphabetical-index-mark text:string-value="saving files"/>Saving a Document</text:h>
      <text:p text:style-name="P20">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9703125" text:continue-list="list39734946"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3">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3">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3">To save an open document with the current file name, choose </text:span><text:span text:style-name="OOoMenuPath"><text:span text:style-name="T1">File &gt; Save</text:span></text:span><text:span text:style-name="T3">. This will overwrite the last saved state of the file.</text:span></text:p>
      <text:h text:style-name="P61"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9">Save As</text:span> dialog to enter a password.</text:p>
      <text:list xml:id="list857584271132740845"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3"> Y</text:span><text:span text:style-name="T1">ou will receive a prompt (</text:span><text:span text:style-name="T1"><text:sequence-ref text:reference-format="category-and-value" text:ref-name="refFigure13">Figure 14</text:sequence-ref></text:span><text:span text:style-name="T1">).</text:span></text:p>
        </text:list-item>
      </text:list>
      <text:p text:style-name="P19"><draw:frame draw:style-name="fr9" draw:name="Figure_AOO41GS02_14" text:anchor-type="as-char" svg:y="-2.6835in" svg:width="3.9547in" draw:z-index="11"><draw:text-box fo:min-height="3.2583in"><text:p text:style-name="P21"><draw:frame draw:style-name="fr22" draw:name="AOO41GS02_015" text:anchor-type="as-char" svg:width="3.9547in" svg:height="3.0008in" draw:z-index="18"><draw:image xlink:href="Pictures/10000000000001A7000001419EB99B1E.png" xlink:type="simple" xlink:show="embed" xlink:actuate="onLoad"/></draw:frame></text:p><text:p text:style-name="P21">Figure <text:sequence text:ref-name="refFigure13" text:name="Figure" text:formula="ooow:Figure+1" style:num-format="1">14</text:sequence>: Entering a password for a document</text:p></draw:text-box></draw:frame></text:p>
      <text:list xml:id="list39726249" text:continue-numbering="true" text:style-name="OOoNum_20_123">
        <text:list-item>
          <text:p text:style-name="P45"><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2">Caution</text:p>
            <text:p text:style-name="P31"><draw:frame draw:style-name="fr23" draw:name="AOO41GS02_016_dangersign" text:anchor-type="as-char" svg:y="-0.2634in" svg:width="0.4307in" svg:height="0.398in" draw:z-index="3"><draw:image xlink:href="Pictures/10000201000000500000004A5CA4FE42.png" xlink:type="simple" xlink:show="embed" xlink:actuate="onLoad"/></draw:frame></text:p>
          </table:table-cell>
          <table:table-cell table:style-name="Table6.A1" office:value-type="string">
            <text:p text:style-name="P35">Apache OpenOffice uses a very strong encryption mechanism that makes it almost impossible to recover the contents of a document if you lose the password.</text:p>
          </table:table-cell>
        </table:table-row>
      </table:table>
      <text:p text:style-name="P17">Writer and Calc provide a second level of protection, which allows a file to be viewed but not changed without a password; that is, the file opens in read-only mode.</text:p>
      <text:p text:style-name="P36">To protect a document from being changed:</text:p>
      <text:list xml:id="list39729559" text:continue-list="list39726249" text:style-name="OOoNum_20_123">
        <text:list-item text:start-value="1">
          <text:p text:style-name="P48"><text:span text:style-name="T1">Choose </text:span><text:span text:style-name="OOoMenuPath"><text:span text:style-name="T1">More Options</text:span></text:span><text:span text:style-name="T1"> from the Set Password dialog</text:span><text:span text:style-name="T3">.</text:span></text:p>
        </text:list-item>
        <text:list-item>
          <text:p text:style-name="OOoNum_20_123_20_End"><text:span text:style-name="T1">Enter the password in the </text:span><text:span text:style-name="OOoEmphasis"><text:span text:style-name="T3">Enter password to allow editing</text:span></text:span><text:span text:style-name="OOoMenuPath"><text:span text:style-name="T3"> </text:span></text:span><text:span text:style-name="T1">field. Repeat the password in the</text:span><text:span text:style-name="OOoMenuPath"><text:span text:style-name="T3"> </text:span></text:span><text:span text:style-name="OOoEmphasis"><text:span text:style-name="T3">Confirm password</text:span></text:span><text:span text:style-name="OOoMenuPath"><text:span text:style-name="T3"> </text:span></text:span><text:span text:style-name="T1">field. Click</text:span><text:span text:style-name="OOoMenuPath"><text:span text:style-name="T3"> </text:span></text:span><text:span text:style-name="OOoStrongEmphasis"><text:span text:style-name="T8">OK</text:span></text:span><text:span text:style-name="OOoDefault"><text:span text:style-name="T8">.</text:span></text:span></text:p>
        </text:list-item>
      </text:list>
      <text:h text:style-name="P39" text:outline-level="3">Saving a Document <text:alphabetical-index-mark text:string-value="automatic saving"/>Automatically</text:h>
      <text:p text:style-name="P20">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721890" text:continue-list="list39729559" text:style-name="OOoNum_20_123">
        <text:list-item text:start-value="1">
          <text:p text:style-name="P47"><text:span text:style-name="T1">Choose </text:span><text:span text:style-name="OOoMenuPath"><text:span text:style-name="T1">Tools &gt; Options &gt; Load/Save &gt; General</text:span></text:span><text:span text:style-name="T3">.</text:span></text:p>
        </text:list-item>
        <text:list-item>
          <text:p text:style-name="OOoNum_20_123_20_End"><text:span text:style-name="T3">Mark </text:span><text:span text:style-name="OOoMenuPath"><text:span text:style-name="T1">Save </text:span></text:span><text:alphabetical-index-mark text:string-value="autorecovery"/><text:span text:style-name="OOoMenuPath"><text:span text:style-name="T1">AutoRecovery information every</text:span></text:span><text:span text:style-name="T3">, and set the time interval.</text:span></text:p>
        </text:list-item>
      </text:list>
      <text:h text:style-name="P61" text:outline-level="2">Using the Navigator</text:h>
      <text:p text:style-name="P1">The <text:alphabetical-index-mark-start text:id="IMark155754452"/>Navigator<text:alphabetical-index-mark-end text:id="IMark155754452"/>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2756in" svg:height="0.2756in" draw:z-index="8"><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6"><text:soft-page-break/><draw:frame draw:style-name="fr10" draw:name="Figure_AOO41GS02_15" text:anchor-type="as-char" svg:width="2.7992in" draw:z-index="9"><draw:text-box fo:min-height="3.5465in"><text:p text:style-name="P21"><draw:frame draw:style-name="fr22" draw:name="AOO41GS02_018" text:anchor-type="as-char" svg:width="2.7992in" svg:height="3.298in" draw:z-index="10"><draw:image xlink:href="Pictures/100000000000012F000001657583B82F.png" xlink:type="simple" xlink:show="embed" xlink:actuate="onLoad"/></draw:frame></text:p><text:p text:style-name="P21">Figure <text:sequence text:ref-name="refFigure14" text:name="Figure" text:formula="ooow:Figure+1" style:num-format="1">15</text:sequence>: The Navigator</text:p></draw:text-box></draw:frame></text:p>
      <text:p text:style-name="P1">Click the marker (+ or <text:span text:style-name="T13">triangle</text:span>) by any of the categories to display the list of <text:span text:style-name="T13">i</text:span>tems in that category<text:change-start text:change-id="ct59673040"/>.<text:change-end text:change-id="ct59673040"/><text:change text:change-id="ct59671168"/></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3154in" svg:height="0.3035in" draw:z-index="36"><draw:image xlink:href="Pictures/100000000000001B0000001AF04C4F65.png" xlink:type="simple" xlink:show="embed" xlink:actuate="onLoad"/></draw:frame></text:span><text:span text:style-name="T1">. Click this icon again to show the list box.</text:span></text:p>
      <text:p text:style-name="P36">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54">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5"><text:span text:style-name="T25">If you only want to see the content in a certain category, highlight the category and click the </text:span><text:span text:style-name="OOoMenuPath"><text:span text:style-name="T25">Content View</text:span></text:span><text:span text:style-name="T25"> icon </text:span><text:span text:style-name="T25"><draw:frame draw:style-name="fr25" draw:name="AOO41GS02_020_ContentViewicon" text:anchor-type="as-char" svg:y="-0.2453in" svg:width="0.3154in" svg:height="0.2992in" draw:z-index="37"><draw:image xlink:href="Pictures/100000000000001800000017923F23D8.png" xlink:type="simple" xlink:show="embed" xlink:actuate="onLoad"/></draw:frame></text:span><text:span text:style-name="T25">. Until you click the icon again, only the objects of that category will be displayed.</text:span></text:p>
        </text:list-item>
        <text:list-item>
          <text:p text:style-name="P56"><text:span text:style-name="T1">Click the Navigation icon </text:span><text:span text:style-name="T1"><draw:frame draw:style-name="fr26" draw:name="AOO41GS02_021_NavigationIcon" text:anchor-type="as-char" svg:width="0.4839in" svg:height="0.2917in" draw:z-index="38"><draw:image xlink:href="Pictures/10000000000000250000001CD447DC02.png" xlink:type="simple" xlink:show="embed" xlink:actuate="onLoad"/></draw:frame></text:span><text:span text:style-name="T1"> to display the </text:span><text:alphabetical-index-mark-start text:id="IMark155754452"/><text:span text:style-name="T1">Navigation toolbar</text:span><text:alphabetical-index-mark-end text:id="IMark15575445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9716487" text:continue-list="list39703125"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1">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6"><text:soft-page-break/><draw:frame draw:style-name="fr11" draw:name="Figure_AOO41GS02_16" text:anchor-type="as-char" svg:width="2.4984in" draw:z-index="39"><draw:text-box fo:min-height="1.2366in"><text:p text:style-name="P21"><draw:frame draw:style-name="fr22" draw:name="AOO41GS02_022" text:anchor-type="as-char" svg:width="2.4984in" svg:height="1.0654in" draw:z-index="40"><draw:image xlink:href="Pictures/10000000000001020000006E38EB9D1E.png" xlink:type="simple" xlink:show="embed" xlink:actuate="onLoad"/></draw:frame></text:p><text:p text:style-name="P21">Figure <text:sequence text:ref-name="refFigure15" text:name="Figure" text:formula="ooow:Figure+1" style:num-format="1">16</text:sequence>: Navigation toolbar</text:p></draw:text-box></draw:frame></text:p>
      <text:p text:style-name="P1"/>
      <text:h text:style-name="P63"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898113608"/>Open and Save As dialogs<text:alphabetical-index-mark-end text:id="IMark898113608"/> or the ones provided by your operating system.</text:p>
      <text:p text:style-name="P36">To view or change which type of dialog OpenOffice uses:</text:p>
      <text:list xml:id="list39702736" text:continue-list="list39721890" text:style-name="OOoNum_20_123">
        <text:list-item text:start-value="1">
          <text:p text:style-name="OOoNum_20_123_20_Start"><text:span text:style-name="T1">Choose</text:span><text:span text:style-name="OOoMenuPath"><text:span text:style-name="T3"> </text:span></text:span><text:span text:style-name="OOoMenuPath"><text:span text:style-name="T1">Tools &gt; Options &gt; OpenOffice &gt; General</text:span></text:span><text:span text:style-name="OOoMenuPath"><text:span text:style-name="T3">.</text:span></text:span></text:p>
        </text:list-item>
        <text:list-item>
          <text:p text:style-name="OOoNum_20_123_20_End"><text:span text:style-name="T1">Select the</text:span><text:span text:style-name="OOoMenuPath"><text:span text:style-name="T3"> </text:span></text:span><text:span text:style-name="OOoMenuPath"><text:span text:style-name="T1">Use OpenOffice dialogs</text:span></text:span><text:span text:style-name="OOoMenuPath"><text:span text:style-name="T3">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9"><draw:frame draw:style-name="fr5" draw:name="Figure_AOO41GS02_17" text:anchor-type="as-char" svg:width="5.2354in" draw:z-index="41"><draw:text-box fo:min-height="4.4992in"><text:p text:style-name="P21"><draw:frame draw:style-name="fr13" draw:name="AOO41GS02_023" text:anchor-type="paragraph" svg:width="5.2374in" svg:height="4.1807in" draw:z-index="42"><draw:image xlink:href="Pictures/1000000000000226000001B7D54D146F.png" xlink:type="simple" xlink:show="embed" xlink:actuate="onLoad"/></draw:frame></text:p><text:p text:style-name="P21">Figure <text:sequence text:ref-name="refFigure16" text:name="Figure" text:formula="ooow:Figure+1" style:num-format="1">17</text:sequence>: The OpenOffice Save As dialog</text:p></draw:text-box></draw:frame></text:p>
      <text:p text:style-name="P36">The three buttons in the top right of the OpenOffice Open and Save As dialogs are, from left to right:</text:p>
      <text:list xml:id="list37431175" text:style-name="OOoBullets_20_1">
        <text:list-item text:start-value="1">
          <text:p text:style-name="P6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9704696" text:continue-list="list39716487" text:style-name="OOoBullets_20_1">
        <text:list-item>
          <text:p text:style-name="OOoList_20_1_20_Cont."><text:span text:style-name="OOoStrongEmphasis"><text:span text:style-name="T1">Create New</text:span></text:span><text:span text:style-name="OOoStrongEmphasis"><text:span text:style-name="T5"> Folder</text:span></text:span><text:span text:style-name="OOoStrongEmphasis"><text:span text:style-name="T3">.</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0"><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7">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3"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2">+</text:span></text:span><text:span text:style-name="OOoKeystroke"><text:span text:style-name="T1">Z</text:span></text:span><text:span text:style-name="OOoKeystroke"><text:span text:style-name="T7">,</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2917in" svg:height="0.2398in" draw:z-index="4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23"><draw:frame draw:style-name="fr12" draw:name="Figure_AOO41GS02_18" text:anchor-type="as-char" svg:y="-0.9846in" svg:width="3.1744in" draw:z-index="44"><draw:text-box fo:min-height="1.0618in"><text:p text:style-name="P22"><draw:frame draw:style-name="fr27" draw:name="AOO41GS02_025" text:anchor-type="as-char" svg:width="3.1744in" svg:height="0.7992in" draw:z-index="45"><draw:image xlink:href="Pictures/100000000000013300000060A516A3BF.png" xlink:type="simple" xlink:show="embed" xlink:actuate="onLoad"/></draw:frame></text:p><text:p text:style-name="P21">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4"><draw:frame draw:style-name="fr11" draw:name="Figure_AOO41GS02_19" text:anchor-type="as-char" svg:width="3.1854in" draw:z-index="46"><draw:text-box fo:min-height="1.5543in"><text:p text:style-name="P21"><draw:frame draw:style-name="fr13" draw:name="AOO41GS02_026" text:anchor-type="paragraph" svg:width="3.1681in" svg:height="1.4083in" draw:z-index="47"><draw:image xlink:href="Pictures/10000000000001120000007238D275B0.png" xlink:type="simple" xlink:show="embed" xlink:actuate="onLoad"/></draw:frame>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1" text:outline-level="2"><text:soft-page-break/>Reloading a Document</text:h>
      <text:p text:style-name="OOoTextBody_5f_ListIntro">Reloading is useful in two situations.</text:p>
      <text:list xml:id="list39729540" text:continue-numbering="true" text:style-name="OOoBullets_20_1">
        <text:list-item>
          <text:p text:style-name="P58">You may want to discard all the changes made in an editing session after the last document save.</text:p>
        </text:list-item>
        <text:list-item>
          <text:p text:style-name="P50">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61" text:outline-level="2"><text:reference-mark-start text:name="Closing a document"/><text:alphabetical-index-mark text:string-value="closing a document"/>Closing a Document<text:reference-mark-end text:name="Closing a document"/></text:h>
      <text:p text:style-name="P11"><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6"><draw:frame draw:style-name="fr11" draw:name="Figure_AOO41GS02_20" text:anchor-type="as-char" svg:width="3.0807in" draw:z-index="4"><draw:text-box fo:min-height="1.028in"><text:p text:style-name="P21"><draw:frame draw:style-name="fr18" draw:name="AOO41GS02_027" text:anchor-type="as-char" svg:width="3.002in" svg:height="0.778in" draw:z-index="5"><draw:image xlink:href="Pictures/10000201000000F700000040F46BFAF6.png" xlink:type="simple" xlink:show="embed" xlink:actuate="onLoad"/></draw:frame></text:p><text:p text:style-name="P21">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 text:c="2"/><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6">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1">Save</text:span></text:span><text:span text:style-name="OOoDefault"><text:span text:style-name="T1">:</text:span></text:span><text:span text:style-name="T1"> The document is saved and then closed.</text:span></text:p>
        </text:list-item>
      </text:list>
      <text:list xml:id="list39710049" text:continue-list="list39729540"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2">Caution</text:p>
            <text:p text:style-name="P33"><draw:frame draw:style-name="fr23" draw:name="AOO41GS02_028_dangersign" text:anchor-type="as-char" svg:y="-0.2634in" svg:width="0.4307in" svg:height="0.398in" draw:z-index="6"><draw:image xlink:href="Pictures/10000201000000500000004A5CA4FE42.png" xlink:type="simple" xlink:show="embed" xlink:actuate="onLoad"/></draw:frame></text:p>
          </table:table-cell>
          <table:table-cell table:style-name="Table2.A1" office:value-type="string">
            <text:p text:style-name="P35">Not saving your document could result in the loss of recently made changes, or worse still, your entire file.</text:p>
          </table:table-cell>
        </table:table-row>
      </table:table>
      <text:h text:style-name="P6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9">If all the documents have been saved, Apache OpenOffice closes immediately. If any documents have been modified but not saved, a warning message appears. Follow the procedure in “</text:span><text:span text:style-name="T9"><text:reference-ref text:reference-format="text" text:ref-name="Closing a document">Closing a Document</text:reference-ref></text:span><text:span text:style-name="T9">”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7-09T19:48:18.75</dc:date>
    <dc:creator>Keith McKenna</dc:creator>
    <meta:editing-duration>PT20H47M56S</meta:editing-duration>
    <meta:editing-cycles>134</meta:editing-cycles>
    <meta:generator>OpenOffice/4.1.12$Win32 OpenOffice.org_project/4112m1$Build-9809</meta:generator>
    <meta:keyword>Version 4.1</meta:keyword>
    <dc:subject>Apache OpenOffice User Guides</dc:subject>
    <meta:document-statistic meta:table-count="3" meta:image-count="28" meta:object-count="0" meta:page-count="19" meta:paragraph-count="278" meta:word-count="5316" meta:character-count="3105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